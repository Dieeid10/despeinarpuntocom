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6a54a" officeooo:paragraph-rsid="0016a54a"/>
    </style:style>
    <style:style style:name="P2" style:family="paragraph" style:parent-style-name="Standard">
      <style:paragraph-properties fo:text-align="start" style:justify-single-word="false"/>
      <style:text-properties officeooo:rsid="0016a54a" officeooo:paragraph-rsid="0016a54a"/>
    </style:style>
    <style:style style:name="P3" style:family="paragraph" style:parent-style-name="Standard">
      <style:paragraph-properties fo:text-align="center" style:justify-single-word="false"/>
      <style:text-properties fo:font-size="16pt" officeooo:rsid="0016a54a" officeooo:paragraph-rsid="0016a54a" style:font-size-asian="16pt" style:font-size-complex="16pt"/>
    </style:style>
    <style:style style:name="P4" style:family="paragraph" style:parent-style-name="Standard">
      <style:paragraph-properties fo:text-align="start" style:justify-single-word="false"/>
      <style:text-properties officeooo:rsid="0017579f" officeooo:paragraph-rsid="0017579f"/>
    </style:style>
    <style:style style:name="P5" style:family="paragraph" style:parent-style-name="Standard">
      <style:paragraph-properties fo:text-align="start" style:justify-single-word="false"/>
      <style:text-properties fo:font-size="8pt" officeooo:rsid="0017579f" officeooo:paragraph-rsid="0017579f" style:font-size-asian="8pt" style:font-size-complex="8pt"/>
    </style:style>
    <style:style style:name="P6" style:family="paragraph" style:parent-style-name="Standard">
      <style:paragraph-properties fo:text-align="start" style:justify-single-word="false"/>
      <style:text-properties fo:font-size="8pt" officeooo:rsid="00199879" officeooo:paragraph-rsid="00199879" style:font-size-asian="7pt" style:font-size-complex="8pt"/>
    </style:style>
    <style:style style:name="P7" style:family="paragraph" style:parent-style-name="Standard">
      <style:paragraph-properties fo:text-align="start" style:justify-single-word="false"/>
      <style:text-properties fo:font-size="8pt" officeooo:rsid="001a69c5" officeooo:paragraph-rsid="001a69c5" style:font-size-asian="7pt" style:font-size-complex="8pt"/>
    </style:style>
    <style:style style:name="P8" style:family="paragraph" style:parent-style-name="Standard">
      <style:paragraph-properties fo:text-align="start" style:justify-single-word="false"/>
      <style:text-properties fo:font-size="8pt" style:text-underline-style="none" officeooo:rsid="001a69c5" officeooo:paragraph-rsid="001a69c5" style:font-size-asian="7pt" style:font-size-complex="8pt"/>
    </style:style>
    <style:style style:name="P9" style:family="paragraph" style:parent-style-name="Standard">
      <style:paragraph-properties fo:text-align="start" style:justify-single-word="false"/>
      <style:text-properties fo:font-size="12pt" officeooo:rsid="0018c88d" officeooo:paragraph-rsid="0018c88d" style:font-size-asian="12pt" style:font-size-complex="12pt"/>
    </style:style>
    <style:style style:name="P10" style:family="paragraph" style:parent-style-name="Standard">
      <style:paragraph-properties fo:text-align="start" style:justify-single-word="false"/>
      <style:text-properties fo:font-size="12pt" officeooo:rsid="00199879" officeooo:paragraph-rsid="00199879" style:font-size-asian="10.5pt" style:font-size-complex="12pt"/>
    </style:style>
    <style:style style:name="P11" style:family="paragraph" style:parent-style-name="Standard">
      <style:paragraph-properties fo:text-align="start" style:justify-single-word="false"/>
      <style:text-properties fo:font-size="12pt" officeooo:rsid="001a69c5" officeooo:paragraph-rsid="001a69c5" style:font-size-asian="10.5pt" style:font-size-complex="12pt"/>
    </style:style>
    <style:style style:name="P12" style:family="paragraph" style:parent-style-name="Standard">
      <style:paragraph-properties fo:text-align="start" style:justify-single-word="false"/>
      <style:text-properties officeooo:rsid="001cf632" officeooo:paragraph-rsid="001cf632"/>
    </style:style>
    <style:style style:name="P13" style:family="paragraph" style:parent-style-name="Standard">
      <style:paragraph-properties fo:text-align="start" style:justify-single-word="false"/>
      <style:text-properties officeooo:rsid="001de5bd" officeooo:paragraph-rsid="001de5bd"/>
    </style:style>
    <style:style style:name="P14" style:family="paragraph" style:parent-style-name="Text_20_body">
      <style:paragraph-properties fo:margin-left="0cm" fo:margin-right="0cm" fo:text-indent="0cm" style:auto-text-indent="false" style:writing-mode="lr-tb"/>
    </style:style>
    <style:style style:name="P15" style:family="paragraph" style:parent-style-name="Text_20_body">
      <style:text-properties fo:font-size="8pt" officeooo:rsid="001c0932" officeooo:paragraph-rsid="001c0932" style:font-size-asian="7pt" style:font-size-complex="8pt"/>
    </style:style>
    <style:style style:name="P16" style:family="paragraph" style:parent-style-name="Text_20_body">
      <style:text-properties fo:font-size="8pt" officeooo:rsid="001c4834" officeooo:paragraph-rsid="001c4834" style:font-size-asian="7pt" style:font-size-complex="8pt"/>
    </style:style>
    <style:style style:name="P17" style:family="paragraph" style:parent-style-name="Text_20_body" style:list-style-name="L2">
      <style:paragraph-properties fo:margin-top="0cm" fo:margin-bottom="0cm" style:contextual-spacing="false"/>
      <style:text-properties fo:font-size="8pt" style:font-size-asian="8pt" style:font-size-complex="8pt"/>
    </style:style>
    <style:style style:name="P18" style:family="paragraph" style:parent-style-name="Text_20_body" style:list-style-name="L3">
      <style:paragraph-properties fo:margin-top="0cm" fo:margin-bottom="0cm" style:contextual-spacing="false"/>
      <style:text-properties fo:font-size="8pt" officeooo:paragraph-rsid="001c0932" style:font-size-asian="8pt" style:font-size-complex="8pt"/>
    </style:style>
    <style:style style:name="P19" style:family="paragraph" style:parent-style-name="Text_20_body" style:list-style-name="L4">
      <style:paragraph-properties fo:margin-top="0cm" fo:margin-bottom="0cm" style:contextual-spacing="false"/>
      <style:text-properties fo:font-size="8pt" style:font-size-asian="8pt" style:font-size-complex="8pt"/>
    </style:style>
    <style:style style:name="P20" style:family="paragraph" style:parent-style-name="Text_20_body" style:list-style-name="L5">
      <style:paragraph-properties fo:margin-top="0cm" fo:margin-bottom="0cm" style:contextual-spacing="false"/>
      <style:text-properties fo:font-size="8pt" style:font-size-asian="8pt" style:font-size-complex="8pt"/>
    </style:style>
    <style:style style:name="P21" style:family="paragraph" style:parent-style-name="Text_20_body" style:list-style-name="L6">
      <style:paragraph-properties fo:margin-top="0cm" fo:margin-bottom="0cm" style:contextual-spacing="false"/>
      <style:text-properties fo:font-size="8pt" style:font-size-asian="8pt" style:font-size-complex="8pt"/>
    </style:style>
    <style:style style:name="P22" style:family="paragraph" style:parent-style-name="Text_20_body" style:list-style-name="L7">
      <style:paragraph-properties fo:margin-top="0cm" fo:margin-bottom="0cm" style:contextual-spacing="false"/>
      <style:text-properties fo:font-size="8pt" style:font-size-asian="8pt" style:font-size-complex="8pt"/>
    </style:style>
    <style:style style:name="P23" style:family="paragraph" style:parent-style-name="Text_20_body" style:list-style-name="L8">
      <style:paragraph-properties fo:margin-top="0cm" fo:margin-bottom="0cm" style:contextual-spacing="false"/>
      <style:text-properties fo:font-size="8pt" style:font-size-asian="8pt" style:font-size-complex="8pt"/>
    </style:style>
    <style:style style:name="P24" style:family="paragraph" style:parent-style-name="Text_20_body" style:list-style-name="L9">
      <style:paragraph-properties fo:margin-top="0cm" fo:margin-bottom="0cm" style:contextual-spacing="false"/>
      <style:text-properties fo:font-size="8pt" style:font-size-asian="8pt" style:font-size-complex="8pt"/>
    </style:style>
    <style:style style:name="P25" style:family="paragraph" style:parent-style-name="Text_20_body" style:list-style-name="L10">
      <style:paragraph-properties fo:margin-top="0cm" fo:margin-bottom="0cm" style:contextual-spacing="false"/>
      <style:text-properties fo:font-size="8pt" style:font-size-asian="8pt" style:font-size-complex="8pt"/>
    </style:style>
    <style:style style:name="P26" style:family="paragraph" style:parent-style-name="Text_20_body" style:list-style-name="L11">
      <style:paragraph-properties fo:margin-top="0cm" fo:margin-bottom="0cm" style:contextual-spacing="false"/>
      <style:text-properties fo:font-size="8pt" style:font-size-asian="8pt" style:font-size-complex="8pt"/>
    </style:style>
    <style:style style:name="P27" style:family="paragraph" style:parent-style-name="Text_20_body" style:list-style-name="L12">
      <style:paragraph-properties fo:margin-top="0cm" fo:margin-bottom="0cm" style:contextual-spacing="false"/>
      <style:text-properties fo:font-size="8pt" style:font-size-asian="8pt" style:font-size-complex="8pt"/>
    </style:style>
    <style:style style:name="P28" style:family="paragraph" style:parent-style-name="Text_20_body" style:list-style-name="L13">
      <style:paragraph-properties fo:margin-top="0cm" fo:margin-bottom="0cm" style:contextual-spacing="false"/>
      <style:text-properties fo:font-size="8pt" style:font-size-asian="8pt" style:font-size-complex="8pt"/>
    </style:style>
    <style:style style:name="P29" style:family="paragraph" style:parent-style-name="Text_20_body" style:list-style-name="L14">
      <style:text-properties fo:font-size="8pt" style:font-size-asian="8pt" style:font-size-complex="8pt"/>
    </style:style>
    <style:style style:name="P30" style:family="paragraph" style:parent-style-name="Text_20_body">
      <style:paragraph-properties fo:margin-top="0cm" fo:margin-bottom="0cm" style:contextual-spacing="false"/>
      <style:text-properties fo:font-size="8pt" officeooo:paragraph-rsid="001c0932" style:font-size-asian="8pt" style:font-size-complex="8pt"/>
    </style:style>
    <style:style style:name="P31" style:family="paragraph" style:parent-style-name="Text_20_body">
      <style:paragraph-properties fo:margin-top="0cm" fo:margin-bottom="0cm" style:contextual-spacing="false"/>
      <style:text-properties fo:font-size="8pt" style:font-size-asian="8pt" style:font-size-complex="8pt"/>
    </style:style>
    <style:style style:name="P32" style:family="paragraph" style:parent-style-name="Text_20_body">
      <style:text-properties fo:font-size="8pt" style:font-size-asian="8pt" style:font-size-complex="8pt"/>
    </style:style>
    <style:style style:name="P33" style:family="paragraph" style:parent-style-name="Text_20_body">
      <style:text-properties fo:font-size="8pt" officeooo:rsid="001c4834" officeooo:paragraph-rsid="001c4834" style:font-size-asian="8pt" style:font-size-complex="8pt"/>
    </style:style>
    <style:style style:name="P34" style:family="paragraph" style:parent-style-name="Text_20_body" style:list-style-name="L2">
      <style:paragraph-properties fo:text-align="start" style:justify-single-word="false"/>
      <style:text-properties fo:font-size="8pt" style:text-underline-style="none" officeooo:rsid="001a69c5" officeooo:paragraph-rsid="001c0932" style:font-size-asian="8pt" style:font-size-complex="8pt"/>
    </style:style>
    <style:style style:name="P35" style:family="paragraph" style:parent-style-name="Text_20_body">
      <style:text-properties fo:font-size="12pt" officeooo:rsid="001c0932" officeooo:paragraph-rsid="001c0932" style:font-size-asian="12pt" style:font-size-complex="12pt"/>
    </style:style>
    <style:style style:name="P36" style:family="paragraph" style:parent-style-name="Text_20_body">
      <style:paragraph-properties fo:text-align="start" style:justify-single-word="false"/>
      <style:text-properties officeooo:rsid="001cf632" officeooo:paragraph-rsid="001cf632"/>
    </style:style>
    <style:style style:name="T1" style:family="text">
      <style:text-properties style:text-underline-style="solid" style:text-underline-width="auto" style:text-underline-color="font-color"/>
    </style:style>
    <style:style style:name="T2" style:family="text">
      <style:text-properties fo:font-size="8pt" style:font-size-asian="8pt" style:font-size-complex="8pt"/>
    </style:style>
    <style:style style:name="T3" style:family="text">
      <style:text-properties fo:font-size="8pt" officeooo:rsid="001c4834" style:font-size-asian="8pt" style:font-size-complex="8pt"/>
    </style:style>
    <style:style style:name="T4" style:family="text">
      <style:text-properties fo:font-size="8pt" style:text-underline-style="solid" style:text-underline-width="auto" style:text-underline-color="font-color" style:font-size-asian="8pt" style:font-size-complex="8pt"/>
    </style:style>
    <style:style style:name="T5" style:family="text">
      <style:text-properties fo:font-size="8pt" style:text-underline-style="none" style:font-size-asian="8pt" style:font-size-complex="8pt"/>
    </style:style>
    <style:style style:name="T6" style:family="text">
      <style:text-properties officeooo:rsid="001c4834"/>
    </style:style>
    <style:style style:name="T7" style:family="text">
      <style:text-properties style:font-size-asian="8pt"/>
    </style:style>
    <style:style style:name="T8" style:family="text">
      <style:text-properties style:text-underline-style="none"/>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bajo práctico Integrador</text:p>
      <text:p text:style-name="P3">Base de datos</text:p>
      <text:p text:style-name="P1"/>
      <text:p text:style-name="P2">Sistema de gestión de viajes para la empresa de turismo Despeinar </text:p>
      <text:p text:style-name="P13">Nombre: Diego Bassi</text:p>
      <text:p text:style-name="P13">Materia: Administración de bases de datos</text:p>
      <text:p text:style-name="P2"/>
      <text:p text:style-name="P12">Consigna ficticia del sistema</text:p>
      <text:p text:style-name="P12"/>
      <text:p text:style-name="P36"><text:span text:style-name="T2">La empresa </text:span><text:span text:style-name="Strong_20_Emphasis"><text:span text:style-name="T2">Despeinar</text:span></text:span><text:span text:style-name="T2">, dedicada a la comercialización de vuelos y paquetes turísticos, solicitó el desarrollo de un sistema de base de datos para mejorar la organización de su información interna. Actualmente, la empresa maneja datos de clientes, reservas, vuelos, servicios y pagos de manera dispersa, lo que </text:span><text:span text:style-name="T5">provoca</text:span><text:span text:style-name="T2"> duplicación de información, errores en la asignación de asientos, dificultad para controlar los pagos y problemas al momento de emitir comprobantes.</text:span></text:p>
      <text:p text:style-name="P32">Por este motivo, se plantea diseñar una base de datos relacional que centralice la información y permita gestionar clientes, vuelos, paquetes turísticos, servicios adicionales, pasajeros, reservas y pagos. Además, el sistema deberá contemplar usuarios con roles para restringir el acceso a determinadas opciones administrativas.</text:p>
      <text:p text:style-name="P2"/>
      <text:p text:style-name="P2">1. Universo del discurso</text:p>
      <text:p text:style-name="P2"/>
      <text:p text:style-name="P5">El sistema que desarrolle está pensado para una empresa de turismo que necesita organizar y administrar de forma más eficiente la información relacionada con sus viajes, clientes, vuelos, paquetes, servicios adicionales, reservas y pagos.</text:p>
      <text:p text:style-name="P5"/>
      <text:p text:style-name="P5">En una empresa de este tipo, <text:tab/>manejar los datos de manera desordenada puede generar problemas como reservas duplicadas, errores al asignar asientos, dificultad para consultar un pago, pérdida de información de clientes. Por eso, se propone una base de datos relacional que centralice toda la información y permita trabajar de forma más segura y organizada.</text:p>
      <text:p text:style-name="P5"/>
      <text:p text:style-name="P5">El sistema permite registrar clientes, vuelos, administrar aerolineas y aeropuertos, crear paquetes turísticos, asociar servicios adicionales, generar reservas, cargar pasajeros, asignar asientos y registrar pagos. También contempla usuarios internos junto con sus respectivos roles, para que ciertas opciones del sistema puedan estar restringidas según el tipo de permiso. </text:p>
      <text:p text:style-name="P4"/>
      <text:p text:style-name="P4">2. Requisitos funcionales</text:p>
      <text:p text:style-name="P4"/>
      <text:p text:style-name="P5">1. El sistema debe permitir registrar clientes con sus datos personales.</text:p>
      <text:p text:style-name="P5">2. El sistema debe poder registrar usuarios internos y asociarlos a un rol determinado.</text:p>
      <text:p text:style-name="P5">3. El sistema debe permitir administrar roles para el control de acceso.</text:p>
      <text:p text:style-name="P5">4. El sistema debe poder registrar aeropuertos.</text:p>
      <text:p text:style-name="P5">5. El sistema debe poder registrar aerolíneas.</text:p>
      <text:p text:style-name="P5">6. El sistema debe poder manejar vuelos indicando origen, destino, tipo de vuelo, fecha de salida, fecha de llegada y aerolínea.</text:p>
      <text:p text:style-name="P5">7. El sistema debe permitir administrar clases de asiento y asientos disponibles para cada vuelo.</text:p>
      <text:p text:style-name="P5">8. El sistema debe permitir administrar paquetes turísticos con nombre, descripción, duración, precio, vuelos incluidos y servicios adicionales.</text:p>
      <text:p text:style-name="P5">9. El sistema debe poder registrar reservas realizadas por clientes, indicando corresponde a un vuelo individual o a un paquete.</text:p>
      <text:p text:style-name="P5">10. El sistema debe poder cargar varios pasajeros dentro de una misma reserva.</text:p>
      <text:p text:style-name="P5">11. El sistema debe poder asignar un asiento unico a cada pasajero.</text:p>
      <text:p text:style-name="P5">12. El sistema debe permitir registrar pagos asociados a una reserva, indicando monto, método de pago, estado del pago y comprobante.</text:p>
      <text:p text:style-name="P5">13. El sistema debe permitir agregar servicios adicionales.</text:p>
      <text:p text:style-name="P5">14. El sistema debe permitir consultar información detallada de reservas, vuelos, paquetes, clientes y pagos.</text:p>
      <text:p text:style-name="P5">15. El sistema debe permitir cancelar reservas o modificar su estado.</text:p>
      <text:p text:style-name="P5">16. El sistema debe permitir generar información útil para comprobantes.</text:p>
      <text:p text:style-name="P5"/>
      <text:p text:style-name="P9">3. Requisitos no funcionales</text:p>
      <text:p text:style-name="P9"/>
      <text:p text:style-name="P6">1. El sistema debe mantener la integridad de los datos mediante claves primarias, claves foraneas y restricciones.</text:p>
      <text:p text:style-name="P6">2. El sistema debe evitar que se repitan datos, como documentos o mails de clientes y usuarios.</text:p>
      <text:p text:style-name="P6">3. El sistema debe impedir que un mismo asiento sea asignado a más de un pasajero.</text:p>
      <text:p text:style-name="P6">4. El sistema debe permitir un acceso restringido a determinadas opciones por rol de usuario.</text:p>
      <text:p text:style-name="P6">5. El sistema debe facilitar consultas rápidas sobre reservas, vuelos, clientes y pagos.</text:p>
      <text:p text:style-name="P6">6. El sistema debe asegurar que los estados de reservas y pagos sean válidos y consistenes.</text:p>
      <text:p text:style-name="P6">7. El sistema debe estar normalizado para reducir la redundancia y evitar inconsistencias.</text:p>
      <text:p text:style-name="P6">8. El sistema debe permitir obtener información clara para la operación diaria de la empresa.</text:p>
      <text:p text:style-name="P6"/>
      <text:p text:style-name="P10">4. Modelo entidad-relación</text:p>
      <text:p text:style-name="P10"/>
      <text:p text:style-name="P6">Las entidades principales del sistema son clientes, usuarios, roles, aeropuertos, aerolíneas, vuelos, clases, asientos, paquetes, servicios adicionales, reservas, pagos y las tablas intermedias que permiten representar relaciones de muchos a muchos.</text:p>
      <text:p text:style-name="P6"/>
      <text:p text:style-name="P6"><text:soft-page-break/>La entidad clientes representa a las personas que realizan compras a la empresa.<text:line-break/>Un cliente puede comprar un vuelo o un paquete y realizar varias reservas</text:p>
      <text:p text:style-name="P6"/>
      <text:p text:style-name="P7">La entidad reservas representa la operación de compra. Una reserva puede corresponder a un vuelo o un paquete turístico. Además, permite agregar a varios pasajeros dentro de una misma reserva.</text:p>
      <text:p text:style-name="P7"/>
      <text:p text:style-name="P7">La entidad reservas_pasajeros representa a las personas que viajan dentro de una reserva. Esto permite que una reserva incluya más de un pasajero, como ocurre en viajes familiares o grupales.</text:p>
      <text:p text:style-name="P7"/>
      <text:p text:style-name="P7">La entidad asientos representan los lugares disponibles en cada vuelo. Cada asiento pertenece a un vuelo y puede ser asignado a un pasajero.</text:p>
      <text:p text:style-name="P7"/>
      <text:p text:style-name="P7">La entidad vuelos representa los viajes aéreos disponibles, indicando origen, destino, fechas y aerolínea.</text:p>
      <text:p text:style-name="P7"/>
      <text:p text:style-name="P7">La entidad paquetes representa productos turísticos armados por la empresa. Un paquete puede incluir varios vuelos y servicios adicionales.</text:p>
      <text:p text:style-name="P7"/>
      <text:p text:style-name="P7">La entidad servicios_adicionales representa servicios como traslado, seguros, excursiones, u otros extras que pueden formar parte del paquete o agregar a una reserva.</text:p>
      <text:p text:style-name="P7"/>
      <text:p text:style-name="P7">La entidad pagos representa los pagos realizados por cada reserva, junto con su método de pago, estado y comprobante.</text:p>
      <text:p text:style-name="P7"/>
      <text:p text:style-name="P7">También incluye las entidades usuarios y roles para el uso interno del sistema.</text:p>
      <text:p text:style-name="P7"/>
      <text:p text:style-name="P11">5. Relaciones principales</text:p>
      <text:p text:style-name="P11"><text:span text:style-name="T1"/></text:p>
      <text:p text:style-name="P8">Las relaciones principales del sistema son las siguientes:</text:p>
      <text:p text:style-name="P7"><text:span text:style-name="T1"/></text:p>
      <text:list text:style-name="L2">
        <text:list-item>
          <text:p text:style-name="P17">Una reserva puede tener varios pasajeros, pero cada pasajero pertenece a una única reserva.<text:line-break/>Cardinalidad: Reserva 1 a N Reservas_Pasajeros.</text:p>
          <text:p text:style-name="P17"/>
        </text:list-item>
        <text:list-item>
          <text:p text:style-name="P34">Un cliente puede realizar muchas reservas, pero cada reserva pertenece a un único cliente.<text:line-break/>Cardinalidad: Cliente 1 a N Reservas.</text:p>
        </text:list-item>
      </text:list>
      <text:list text:style-name="L3">
        <text:list-item>
          <text:p text:style-name="P18">Cada pasajero tiene asignado un asiento.<text:line-break/>Cardinalidad: Reservas_Pasajeros N a 1 Asientos.</text:p>
        </text:list-item>
      </text:list>
      <text:p text:style-name="P30"/>
      <text:list text:style-name="L4">
        <text:list-item>
          <text:p text:style-name="P19">Un vuelo puede tener muchos asientos, pero cada asiento pertenece a un único vuelo.<text:line-break/>Cardinalidad: Vuelo 1 a N Asientos.</text:p>
        </text:list-item>
      </text:list>
      <text:p text:style-name="P31"/>
      <text:list text:style-name="L5">
        <text:list-item>
          <text:p text:style-name="P20">Un asiento pertenece a una clase de asiento.<text:line-break/>Cardinalidad: Clase 1 a N Asientos.</text:p>
        </text:list-item>
      </text:list>
      <text:p text:style-name="P31"/>
      <text:list text:style-name="L6">
        <text:list-item>
          <text:p text:style-name="P21">Un vuelo tiene un aeropuerto de origen y un aeropuerto de destino.<text:line-break/>Cardinalidad: Aeropuerto 1 a N Vuelos, tanto para origen como para destino.</text:p>
        </text:list-item>
      </text:list>
      <text:p text:style-name="P31"/>
      <text:list text:style-name="L7">
        <text:list-item>
          <text:p text:style-name="P22">Una aerolínea puede operar muchos vuelos, pero cada vuelo pertenece a una sola aerolínea.<text:line-break/>Cardinalidad: Aerolínea 1 a N Vuelos.</text:p>
        </text:list-item>
      </text:list>
      <text:p text:style-name="P31"/>
      <text:list text:style-name="L8">
        <text:list-item>
          <text:p text:style-name="P23">Una reserva puede estar asociada a varios vuelos, y un vuelo puede estar incluido en varias reservas.<text:line-break/>Cardinalidad: Reservas N a M Vuelos, resuelta mediante Reservas_Vuelos.</text:p>
        </text:list-item>
      </text:list>
      <text:p text:style-name="P31"/>
      <text:list text:style-name="L9">
        <text:list-item>
          <text:p text:style-name="P24">Una reserva puede estar asociada a un paquete turístico.<text:line-break/>Cardinalidad: Paquete 1 a N Reservas, considerando que una reserva puede o no tener paquete.</text:p>
        </text:list-item>
      </text:list>
      <text:p text:style-name="P31"/>
      <text:list text:style-name="L10">
        <text:list-item>
          <text:p text:style-name="P25">Un paquete puede incluir varios vuelos, y un vuelo puede formar parte de varios paquetes.<text:line-break/>Cardinalidad: Paquetes N a M Vuelos, resuelta mediante Paquetes_Vuelos.</text:p>
        </text:list-item>
      </text:list>
      <text:p text:style-name="P31"/>
      <text:list text:style-name="L11">
        <text:list-item>
          <text:p text:style-name="P26">Un paquete puede incluir varios servicios adicionales, y un servicio puede estar incluido en varios paquetes.<text:line-break/>Cardinalidad: Paquetes N a M Servicios_Adicionales, resuelta mediante Paquetes_Servicios.</text:p>
        </text:list-item>
      </text:list>
      <text:p text:style-name="P31"/>
      <text:list text:style-name="L12">
        <text:list-item>
          <text:p text:style-name="P27">Una reserva puede tener varios servicios adicionales, y un servicio puede estar asociado a varias reservas.<text:line-break/>Cardinalidad: Reservas N a M Servicios_Adicionales, resuelta mediante Reservas_Servicios.</text:p>
        </text:list-item>
      </text:list>
      <text:p text:style-name="P31"/>
      <text:list text:style-name="L13">
        <text:list-item>
          <text:p text:style-name="P28">Una reserva puede tener pagos asociados, pero cada pago corresponde a una única reserva.<text:line-break/>Cardinalidad: Reserva 1 a N Pagos.</text:p>
        </text:list-item>
      </text:list>
      <text:p text:style-name="P31"/>
      <text:list text:style-name="L14">
        <text:list-item>
          <text:p text:style-name="P29">Un rol puede estar asociado a varios usuarios, pero cada usuario tiene un solo rol.<text:line-break/>Cardinalidad: Rol 1 a N Usuarios.</text:p>
        </text:list-item>
      </text:list>
      <text:p text:style-name="P32"/>
      <text:p text:style-name="P35">6. Proceso de normalización</text:p>
      <text:p text:style-name="P15"><text:soft-page-break/>Primera forma normal</text:p>
      <text:p text:style-name="P15">El <text:span text:style-name="T6">sistema </text:span>cumple con la primera forma normal por que todos los atributos contienen valores atomicos, es decir, no se almacenan datos duplicados dentro de una misma columna.</text:p>
      <text:p text:style-name="P15">Por ejemplo si una reserva incluye cuatro pasajeros, no se guardan todos los pasajeros en un único campo. En su lugar, cada pasajero se registra como una fila independiente en la tabla reservas_pasajeros, que esta relacionada con la misma reserva.</text:p>
      <text:p text:style-name="P15">De la misma forma, los vuelos de una reserva no se guardan como una lista dentro de la tabla reservas, sino que se almacenan en la tabla reservas_vuelos. Lo mismo con los servicios adicionales y paquetes.</text:p>
      <text:p text:style-name="P15">Segunda forma normal</text:p>
      <text:p text:style-name="P16">El sistema cumple con la segunda forma normal por que todas las tablas tienen una clave primaria definida y los atributos dependen completamente de esa clave.</text:p>
      <text:p text:style-name="P16"><text:span text:style-name="T7">En las tablas con clave primaria simple, como clientes, vuelos, paquetes, reservas o pagos, los atributos describen directamente a la entidad identificada por la clave primaria.</text:span></text:p>
      <text:p text:style-name="P14"><text:span text:style-name="T2">En las tablas intermedias con claves compuestas, como </text:span><text:span text:style-name="T3">reservas_vuelos, paquetes_vuelos, paquetes_servicios y reservas_servicios,</text:span><text:span text:style-name="T2"> los datos dependen de la combinación completa de las claves. Por ejemplo, en </text:span><text:span text:style-name="T3">reservas_servicios,</text:span><text:span text:style-name="T2"> el atributo </text:span><text:span text:style-name="T3">cantidad </text:span><text:span text:style-name="T2">depende de la combinación entre una reserva y un servicio adicional, no solamente de una de las dos partes.</text:span></text:p>
      <text:p text:style-name="P33">Tercera forma normal</text:p>
      <text:p text:style-name="P33">El modelo cumple con la Tercera Forma Normal porque no existen dependencias transitivas entre atributos no clave. Cada tabla almacena información propia de la entidad que representa.</text:p>
      <text:p text:style-name="P14"><text:span text:style-name="T2">Por ejemplo, los datos de una aerolínea no se guardan dentro de la tabla </text:span><text:span text:style-name="T3">vuelos,</text:span><text:span text:style-name="T2"> sino en la tabla </text:span><text:span text:style-name="T3">aerolineas</text:span><text:span text:style-name="T2">. En </text:span><text:span text:style-name="T3">vuelos </text:span><text:span text:style-name="T2">solo se guarda la clave foránea </text:span><text:span text:style-name="T3">id_aerolinea</text:span><text:span text:style-name="T2">.</text:span></text:p>
      <text:p text:style-name="P14"><text:span text:style-name="T2">De la misma forma, los datos del cliente no se repiten dentro de cada reserva. La tabla </text:span><text:span text:style-name="T3">reservas </text:span><text:span text:style-name="T2">solo almacena </text:span><text:span text:style-name="T3">cliente_id</text:span><text:span text:style-name="T2">, que permite relacionar la reserva con el cliente correspondiente.</text:span></text:p>
      <text:p text:style-name="P32">También los datos de los servicios adicionales se guardan en su propia tabla, y se relacionan con reservas o paquetes mediante tablas intermedias. Esto evita repetir nombres, precios o descripciones de servicios en distintas partes del sistema<text:span text:style-name="T1">.</text:span></text:p>
      <text:p text:style-name="P33"/>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3T16:23:40.586294714</meta:creation-date>
    <dc:date>2026-06-23T22:53:27.552759800</dc:date>
    <meta:editing-duration>PT3H21M41S</meta:editing-duration>
    <meta:editing-cycles>4</meta:editing-cycles>
    <meta:generator>LibreOffice/24.2.7.2$Linux_X86_64 LibreOffice_project/420$Build-2</meta:generator>
    <meta:document-statistic meta:table-count="0" meta:image-count="0" meta:object-count="0" meta:page-count="3" meta:paragraph-count="80" meta:word-count="1521" meta:character-count="9966" meta:non-whitespace-character-count="8536"/>
  </office:meta>
</office:document-meta>
</file>